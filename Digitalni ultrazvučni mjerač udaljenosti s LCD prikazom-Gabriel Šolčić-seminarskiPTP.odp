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draw:fill="none" draw:stroke="non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draw:fill="none" draw:stroke="none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draw:fill="none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draw:fill="none" draw:stroke="none"/>
    </style:style>
    <style:style style:family="presentation" style:name="a483">
      <style:graphic-properties draw:fill="none" draw:stroke="non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draw:fill="none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draw:fill="none" draw:stroke="non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5%" fo:text-align="righ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1.54978in"/>
      </text:list-level-style-number>
      <text:list-level-style-number text:level="7" style:num-format="" style:num-list-format-name="">
        <style:list-level-properties text:space-before="1.87787in"/>
      </text:list-level-style-number>
      <text:list-level-style-number text:level="8" style:num-format="" style:num-list-format-name="">
        <style:list-level-properties text:space-before="2.20595in"/>
      </text:list-level-style-number>
      <text:list-level-style-number text:level="9" style:num-format="" style:num-list-format-name="">
        <style:list-level-properties text:space-before="2.53403in"/>
      </text:list-level-style-number>
    </text:list-style>
    <text:list-style style:name="a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395" draw:master-page-name="Master1-Layout1-title-Naslovni-slajd" presentation:presentation-page-layout-name="Master1-PPL1" draw:id="Slide-256">
        <draw:frame draw:id="id77" presentation:style-name="a399" draw:name="Naslov 1" svg:x="1.38in" svg:y="0.83in" svg:width="10.3in" svg:height="4.42in" presentation:class="title" presentation:placeholder="false">
          <draw:text-box>
            <text:p text:style-name="a398" text:class-names="" text:cond-style-name=""><text:span text:style-name="a396" text:class-names="">Digitalni ultrazvučni mjerač udaljenosti s LCD prikazom</text:span><text:span text:style-name="a397" text:class-names=""/></text:p>
          </draw:text-box>
          <svg:title/>
          <svg:desc/>
        </draw:frame>
        <draw:frame draw:id="id78" presentation:style-name="a407" draw:name="Podnaslov 2" svg:x="1.38in" svg:y="5.25in" svg:width="10.3in" svg:height="1.85in" presentation:class="subtitle" presentation:placeholder="false">
          <draw:text-box>
            <text:p text:style-name="a401" text:class-names="" text:cond-style-name=""><text:span text:style-name="a400" text:class-names=""/></text:p>
            <text:p text:style-name="a403" text:class-names="" text:cond-style-name=""><text:span text:style-name="a402" text:class-names=""/></text:p>
            <text:p text:style-name="a406" text:class-names="" text:cond-style-name=""><text:span text:style-name="a404" text:class-names="">PTP-Seminarski rad</text:span><text:span text:style-name="a405" text:class-names=""/></text:p>
          </draw:text-box>
          <svg:title/>
          <svg:desc/>
        </draw:frame>
      </draw:page>
      <draw:page draw:name="Slide2" draw:style-name="a408" draw:master-page-name="Master1-Layout2-obj-Naslov-i-sadržaj" presentation:presentation-page-layout-name="Master1-PPL2" draw:id="Slide-257">
        <draw:frame draw:id="id79" presentation:style-name="a412" draw:name="Naslov 1" svg:x="1.38in" svg:y="0.4in" svg:width="10.6in" svg:height="1.44965in" presentation:class="title" presentation:placeholder="false">
          <draw:text-box>
            <text:p text:style-name="a411" text:class-names="" text:cond-style-name=""><text:span text:style-name="a409" text:class-names="">Funkcija</text:span><text:span text:style-name="a410" text:class-names=""/></text:p>
          </draw:text-box>
          <svg:title/>
          <svg:desc/>
        </draw:frame>
        <draw:frame draw:id="id80" presentation:style-name="a434" draw:name="Rezervirano mjesto sadržaja 2" svg:x="1.38in" svg:y="2in" svg:width="9.4in" svg:height="4.75868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3" text:class-names="">Sustav predstavlja digitalni ultrazvučni mjerač udaljenosti s LCD prikazom</text:span><text:span text:style-name="a414" text:class-names="">.</text:span></text:p>
              </text:list-item>
            </text:list>
            <text:list text:style-name="a421">
              <text:list-item>
                <text:p text:style-name="a420" text:class-names="" text:cond-style-name=""><text:span text:style-name="a417" text:class-names=""><text:s text:c="1"/></text:span><text:span text:style-name="a418" text:class-names="">Za mjerenje koristi ultrazvučni senzor HC-SR04 koji emitira signal te zatim mjeri vrijeme koje je potrebno da se signal odbije od predmeta i vrati nazad do senzora</text:span><text:span text:style-name="a419" text:class-names="">.</text:span></text:p>
              </text:list-item>
            </text:list>
            <text:list text:style-name="a427">
              <text:list-item>
                <text:p text:style-name="a426" text:class-names="" text:cond-style-name=""><text:span text:style-name="a422" text:class-names=""><text:s text:c="1"/></text:span><text:span text:style-name="a423" text:class-names="">Izračunata udaljenost prikazuje se na LCD zaslonu 16×2.<text:s text:c="1"/></text:span><text:span text:style-name="a424" text:class-names="">Mikrokontroler</text:span><text:span text:style-name="a425" text:class-names=""><text:s text:c="1"/>upravlja radom senzora obrađuje izmjerene podatke te ih prikazuje na LCD zaslonu.<text:s text:c="1"/>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Sustav mjeru u rasponu 2-400cm s tolerancijom 1 cm.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</draw:text-box>
          <svg:title/>
          <svg:desc/>
        </draw:frame>
      </draw:page>
      <draw:page draw:name="Slide3" draw:style-name="a435" draw:master-page-name="Master1-Layout2-obj-Naslov-i-sadržaj" presentation:presentation-page-layout-name="Master1-PPL2" draw:id="Slide-258">
        <draw:frame draw:id="id81" presentation:style-name="a439" draw:name="Naslov 1" svg:x="1.38in" svg:y="0.4in" svg:width="10.6in" svg:height="1.44965in" presentation:class="title" presentation:placeholder="false">
          <draw:text-box>
            <text:p text:style-name="a438" text:class-names="" text:cond-style-name=""><text:span text:style-name="a436" text:class-names="">Komponente</text:span><text:span text:style-name="a437" text:class-names=""/></text:p>
          </draw:text-box>
          <svg:title/>
          <svg:desc/>
        </draw:frame>
        <draw:frame draw:id="id82" presentation:style-name="a468" draw:name="Rezervirano mjesto sadržaja 2" svg:x="1.38in" svg:y="2in" svg:width="9.4in" svg:height="4.75868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0" text:class-names=""><text:s text:c="1"/></text:span><text:span text:style-name="a441" text:class-names="">mikrokontroler</text:span><text:span text:style-name="a442" text:class-names=""><text:s text:c="1"/>AT89C4051 u DIP-20 kućištu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<text:s text:c="2"/>LCD zaslon 16×2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2"/>ultrazvučni senzor HC-SR04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2"/>kvarcni rezonator frekvencije 11,0592 MHz</text:span></text:p>
              </text:list-item>
            </text:list>
            <text:list text:style-name="a458">
              <text:list-item>
                <text:p text:style-name="a457" text:class-names="" text:cond-style-name=""><text:span text:style-name="a454" text:class-names=""><text:s text:c="2"/>potenciometar 10<text:s text:c="1"/></text:span><text:span text:style-name="a455" text:class-names="">kΩ</text:span><text:span text:style-name="a456" text:class-names=""><text:s text:c="1"/>za podešavanje kontrasta LCD zaslona</text:span></text:p>
              </text:list-item>
            </text:list>
            <text:list text:style-name="a463">
              <text:list-item>
                <text:p text:style-name="a462" text:class-names="" text:cond-style-name=""><text:span text:style-name="a459" text:class-names=""><text:s text:c="2"/>tipkalo za resetiranje<text:s text:c="1"/></text:span><text:span text:style-name="a460" text:class-names="">mikrokontrolera</text:span><text:span text:style-name="a461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4" text:class-names=""><text:s text:c="2"/>priključak za napajanje</text:span><text:span text:style-name="a465" text:class-names=""/></text:p>
              </text:list-item>
            </text:list>
          </draw:text-box>
          <svg:title/>
          <svg:desc/>
        </draw:frame>
      </draw:page>
      <draw:page draw:name="Slide4" draw:style-name="a469" draw:master-page-name="Master1-Layout2-obj-Naslov-i-sadržaj" presentation:presentation-page-layout-name="Master1-PPL2" draw:id="Slide-259">
        <draw:frame draw:id="id83" presentation:style-name="a470" draw:name="Naslov 1" svg:x="1.38in" svg:y="0.4in" svg:width="10.6in" svg:height="1.44965in" presentation:class="title" presentation:placeholder="true">
          <draw:text-box/>
          <svg:title/>
          <svg:desc/>
        </draw:frame>
        <draw:frame draw:id="id84" presentation:style-name="a471" draw:name="Rezervirano mjesto sadržaja 3" svg:x="-0in" svg:y="0in" svg:width="12.34314in" svg:height="7.4810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472" draw:master-page-name="Master1-Layout2-obj-Naslov-i-sadržaj" presentation:presentation-page-layout-name="Master1-PPL2" draw:id="Slide-260">
        <draw:frame draw:id="id85" presentation:style-name="a476" draw:name="Naslov 1" svg:x="1.38in" svg:y="0.4in" svg:width="10.6in" svg:height="1.44965in" presentation:class="title" presentation:placeholder="false">
          <draw:text-box>
            <text:p text:style-name="a475" text:class-names="" text:cond-style-name=""><text:span text:style-name="a473" text:class-names="">F.CU</text:span><text:span text:style-name="a474" text:class-names=""/></text:p>
          </draw:text-box>
          <svg:title/>
          <svg:desc/>
        </draw:frame>
        <draw:frame draw:id="id86" presentation:style-name="a477" draw:name="Rezervirano mjesto sadržaja 4" svg:x="2.74085in" svg:y="2.11861in" svg:width="6.67802in" svg:height="4.5214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478" draw:master-page-name="Master1-Layout2-obj-Naslov-i-sadržaj" presentation:presentation-page-layout-name="Master1-PPL2" draw:id="Slide-261">
        <draw:frame draw:id="id87" presentation:style-name="a482" draw:name="Naslov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B.CU</text:span><text:span text:style-name="a480" text:class-names=""/></text:p>
          </draw:text-box>
          <svg:title/>
          <svg:desc/>
        </draw:frame>
        <draw:frame draw:id="id88" presentation:style-name="a483" draw:name="Rezervirano mjesto sadržaja 4" svg:x="2.67385in" svg:y="2in" svg:width="6.81202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7" draw:style-name="a484" draw:master-page-name="Master1-Layout2-obj-Naslov-i-sadržaj" presentation:presentation-page-layout-name="Master1-PPL2" draw:id="Slide-262">
        <draw:frame draw:id="id89" presentation:style-name="a489" draw:name="Naslov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5" text:class-names="">F.</text:span><text:span text:style-name="a486" text:class-names="">Silkscreen</text:span><text:span text:style-name="a487" text:class-names=""/></text:p>
          </draw:text-box>
          <svg:title/>
          <svg:desc/>
        </draw:frame>
        <draw:frame draw:id="id90" presentation:style-name="a490" draw:name="Rezervirano mjesto sadržaja 4" svg:x="2.64415in" svg:y="2in" svg:width="6.87141in" svg:height="4.7586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9" draw:style-name="a491" draw:master-page-name="Master1-Layout2-obj-Naslov-i-sadržaj" presentation:presentation-page-layout-name="Master1-PPL2" draw:id="Slide-264">
        <draw:frame draw:id="id91" presentation:style-name="a495" draw:name="Naslov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F.Mask</text:span><text:span text:style-name="a493" text:class-names=""/></text:p>
          </draw:text-box>
          <svg:title/>
          <svg:desc/>
        </draw:frame>
        <draw:frame draw:id="id92" presentation:style-name="a496" draw:name="Rezervirano mjesto sadržaja 4" svg:x="2.70439in" svg:y="2.04047in" svg:width="6.75094in" svg:height="4.67774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0" draw:style-name="a497" draw:master-page-name="Master1-Layout2-obj-Naslov-i-sadržaj" presentation:presentation-page-layout-name="Master1-PPL2" draw:id="Slide-265">
        <draw:frame draw:id="id93" presentation:style-name="a501" draw:name="Naslov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B.Mask</text:span><text:span text:style-name="a499" text:class-names=""/></text:p>
          </draw:text-box>
          <svg:title/>
          <svg:desc/>
        </draw:frame>
        <draw:frame draw:id="id94" presentation:style-name="a502" draw:name="Rezervirano mjesto sadržaja 4" svg:x="2.6523in" svg:y="2.06131in" svg:width="6.85512in" svg:height="4.63606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1" draw:style-name="a503" draw:master-page-name="Master1-Layout2-obj-Naslov-i-sadržaj" presentation:presentation-page-layout-name="Master1-PPL2" draw:id="Slide-266">
        <draw:frame draw:id="id95" presentation:style-name="a509" draw:name="Naslov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4" text:class-names="">Edge</text:span><text:span text:style-name="a505" text:class-names=""><text:s text:c="1"/></text:span><text:span text:style-name="a506" text:class-names="">Cuts</text:span><text:span text:style-name="a507" text:class-names=""/></text:p>
          </draw:text-box>
          <svg:title/>
          <svg:desc/>
        </draw:frame>
        <draw:frame draw:id="id96" presentation:style-name="a510" draw:name="Rezervirano mjesto sadržaja 4" svg:x="2.6602in" svg:y="2in" svg:width="6.83932in" svg:height="4.75868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2" draw:style-name="a511" draw:master-page-name="Master1-Layout2-obj-Naslov-i-sadržaj" presentation:presentation-page-layout-name="Master1-PPL2" draw:id="Slide-267">
        <draw:frame draw:id="id97" presentation:style-name="a515" draw:name="Naslov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3D</text:span><text:span text:style-name="a513" text:class-names=""/></text:p>
          </draw:text-box>
          <svg:title/>
          <svg:desc/>
        </draw:frame>
        <draw:frame draw:id="id98" presentation:style-name="a516" draw:name="Rezervirano mjesto sadržaja 4" svg:x="1.85871in" svg:y="2in" svg:width="8.44231in" svg:height="4.75868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Naslovni slajd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Naslov i sadržaj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Zaglavlje sekcije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Dva sadržaja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Usporedba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Samo naslov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Prazno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Sadržaj s opisom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Slika s opisom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Naslov i okomiti teks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Okomiti naslov i teks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2b2b2d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1">
      <style:graphic-properties draw:fill="solid" draw:fill-color="#353537" draw:opacity="100%" draw:stroke="non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">
      <style:graphic-properties draw:fill="solid" draw:fill-color="#6f6f74" draw:opacity="100%" draw:stroke="none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">
      <style:graphic-properties draw:fill="solid" draw:fill-color="#353537" draw:opacity="100%" draw:stroke="non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0">
      <style:graphic-properties draw:fill="solid" draw:fill-color="#353537" draw:opacity="100%" draw:stroke="non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">
      <style:graphic-properties draw:fill="solid" draw:fill-color="#353537" draw:opacity="100%" draw:stroke="none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draw:fill="solid" draw:fill-color="#353537" draw:opacity="100%" draw:stroke="non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solid" draw:fill-color="#353537" draw:opacity="100%" draw:stroke="none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">
      <style:graphic-properties draw:fill="solid" draw:fill-color="#353537" draw:opacity="100%" draw:stroke="non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1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15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8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34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3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10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4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38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31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4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8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</office:automatic-styles>
  <office:master-styles>
    <draw:layer-set>
      <draw:layer draw:name="Master1-bg" draw:protected="true"/>
    </draw:layer-set>
    <style:master-page style:name="Master1-Pogled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Kliknite da biste uredili stil naslova matric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Kliknite da biste uredili matric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ruga razina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eća razina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Peta razina stilove teksta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Naslovni-slajd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Kliknite da biste uredili stil naslova matric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Kliknite da biste uredili stil podnaslova matric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Naslov-i-sadržaj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Kliknite da biste uredili stil naslova matric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Kliknite da biste uredili matrice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Druga razina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reća razina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Peta razina stilove teksta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Zaglavlje-sekcije" style:page-layout-name="pageLayout1" draw:style-name="a92">
      <draw:custom-shape svg:x="12.35in" svg:y="0in" svg:width="1in" svg:height="7.5in" draw:id="id18" draw:layer="Master1-bg" draw:style-name="a9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Kliknite da biste uredili stil naslova matric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Kliknite da biste uredili matrice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Dva-sadržaja" style:page-layout-name="pageLayout1" draw:style-name="a115">
      <draw:custom-shape svg:x="12.35in" svg:y="0in" svg:width="1in" svg:height="7.5in" draw:id="id25" draw:layer="Master1-bg" draw:style-name="a11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Kliknite da biste uredili stil naslova matric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Kliknite da biste uredili matrice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Druga razina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reća razina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Peta razina stilove teksta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Kliknite da biste uredili matrice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Druga razina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reća razina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Peta razina stilove teksta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Usporedba" style:page-layout-name="pageLayout1" draw:style-name="a167">
      <draw:custom-shape svg:x="12.35in" svg:y="0in" svg:width="1in" svg:height="7.5in" draw:id="id32" draw:layer="Master1-bg" draw:style-name="a16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Kliknite da biste uredili stil naslova matric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Kliknite da biste uredili matrice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nite da biste uredili matrice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Druga razina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reća razina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Peta razina stilove teksta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Kliknite da biste uredili matrice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Kliknite da biste uredili matrice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Druga razina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reća razina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Peta razina stilove teksta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Samo-naslov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Kliknite da biste uredili stil naslova matric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Prazno" style:page-layout-name="pageLayout1" draw:style-name="a245">
      <draw:custom-shape svg:x="12.35in" svg:y="0in" svg:width="1in" svg:height="7.5in" draw:id="id46" draw:layer="Master1-bg" draw:style-name="a24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Sadržaj-s-opisom" style:page-layout-name="pageLayout1" draw:style-name="a259">
      <draw:custom-shape svg:x="12.35in" svg:y="0in" svg:width="1in" svg:height="7.5in" draw:id="id50" draw:layer="Master1-bg" draw:style-name="a26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Kliknite da biste uredili stil naslova matric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Kliknite da biste uredili matrice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Druga razina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reća razina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Peta razina stilove teksta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Kliknite da biste uredili matrice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Slika-s-opisom" style:page-layout-name="pageLayout1" draw:style-name="a298">
      <draw:custom-shape svg:x="12.35in" svg:y="0in" svg:width="1in" svg:height="7.5in" draw:id="id57" draw:layer="Master1-bg" draw:style-name="a29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Kliknite da biste uredili stil naslova matric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Kliknite ikonu da biste dodali <text:s text:c="1"/>sliku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nite da biste uredili matrice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Naslov-i-okomiti-teks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Kliknite da biste uredili stil naslova matric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Kliknite da biste uredili matric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ruga razina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eća razina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Peta razina stilove teksta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Okomiti-naslov-i-teks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Kliknite da biste uredili stil naslova matric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Kliknite da biste uredili matrice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Druga razina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reća razina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Peta razina stilove teksta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Gabriel Šolčić</meta:initial-creator>
    <dc:creator>Gabriel Šolčić</dc:creator>
    <meta:creation-date>2026-06-23T15:18:54Z</meta:creation-date>
    <dc:date>2026-06-23T15:36:50Z</dc:date>
    <meta:template xlink:href="TM03457515%5b%5bfn=Pogled%5d%5d" xlink:type="simple"/>
    <meta:editing-cycles>1</meta:editing-cycles>
    <meta:editing-duration>PT1076S</meta:editing-duration>
    <meta:document-statistic meta:paragraph-count="24" meta:word-count="140"/>
  </office:meta>
</office:document-meta>
</file>